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2" svg:font-family="Arial" style:font-family-generic="system" style:font-pitch="variable"/>
    <style:font-face style:name="Courier1" svg:font-family="Courier"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style:paragraph-properties fo:margin-top="0in" fo:margin-bottom="0.1665in" loext:contextual-spacing="false" fo:line-height="100%" fo:padding="0in" fo:border="none"/>
    </style:style>
    <style:style style:name="P2" style:family="paragraph" style:parent-style-name="Standard">
      <style:paragraph-properties fo:padding="0in" fo:border="none"/>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 style:family="paragraph" style:parent-style-name="Standard" style:list-style-name="WWNum1">
      <style:paragraph-properties fo:margin-left="0.4165in" fo:margin-right="0in" fo:text-indent="-0.25in" style:auto-text-indent="false" fo:padding="0in" fo:border="none"/>
    </style:style>
    <style:style style:name="P5" style:family="paragraph" style:parent-style-name="Standard" style:list-style-name="WWNum2">
      <style:paragraph-properties fo:margin-left="0.4165in" fo:margin-right="0in" fo:text-indent="-0.25in" style:auto-text-indent="false" fo:padding="0in" fo:border="none"/>
    </style:style>
    <style:style style:name="P6" style:family="paragraph" style:parent-style-name="Heading_20_3">
      <style:paragraph-properties fo:margin-top="0in" fo:margin-bottom="0.1665in" loext:contextual-spacing="false" fo:line-height="100%" fo:padding="0in" fo:border="none"/>
    </style:style>
    <style:style style:name="P7" style:family="paragraph" style:parent-style-name="Heading_20_3">
      <style:paragraph-properties fo:padding="0in" fo:border="none"/>
    </style:style>
    <style:style style:name="P8" style:family="paragraph" style:parent-style-name="Subtitle" style:master-page-name="Standard">
      <style:paragraph-properties fo:margin-top="0.25in" fo:margin-bottom="0.1665in" loext:contextual-spacing="false" fo:line-height="100%" fo:text-align="center" style:justify-single-word="false" style:page-number="1"/>
    </style:style>
    <style:style style:name="T1" style:family="text">
      <style:text-properties fo:font-size="12pt" style:font-size-asian="12pt" style:font-size-complex="12pt"/>
    </style:style>
    <style:style style:name="T2" style:family="text">
      <style:text-properties fo:font-weight="bold" style:font-weight-asian="bold" style:font-weight-complex="bold"/>
    </style:style>
    <style:style style:name="T3" style:family="text">
      <style:text-properties style:font-name="Courier" style:font-name-asian="Courier1" style:font-name-complex="Couri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w6030hs297pf"/><text:span text:style-name="T1">How to obtain Energy=Work!</text:span></text:p>
      <text:p text:style-name="P1">apply_condensation_collapse method, mathematically defines the <text:span text:style-name="T2">extraction mechanism of</text:span> the "potential" that exists in the 7D bulk and converting it into "usable energy" (current, heat, or work) within our 4D brane.</text:p>
      <text:p text:style-name="P6">The Physics of Condensation</text:p>
      <text:p text:style-name="P2">Mathematically, we perform a <text:span text:style-name="T2">projection</text:span>. We have a 7D state vector, but the M_4 (4D spacetime) brane only interacts with the dimensions that have "real-world" extent (indices 3, 4, 5, and 6 in our code).</text:p>
      <text:p text:style-name="P2">The collapse is defined by:</text:p>
      <text:p text:style-name="P3">E_{usable} = \eta \cdot \sum_{i=3}^6 |\psi_i|^2</text:p>
      <text:p text:style-name="P2">Where:</text:p>
      <text:list xml:id="list194382964" text:style-name="WWNum1">
        <text:list-item>
          <text:p text:style-name="P4">\eta (Eta) is the <text:span text:style-name="T2">Coherence Factor</text:span> derived from our 428.5 \text{ Hz} attunement filter.</text:p>
        </text:list-item>
        <text:list-item>
          <text:p text:style-name="P4">|\psi_i|^2 is the <text:span text:style-name="T2">squared magnitude</text:span> of the phase state in the M_4 dimensions, representing the energy density.</text:p>
        </text:list-item>
        <text:list-item>
          <text:p text:style-name="P4">The summation collapses the higher-dimensional potential into a single scalar value: <text:span text:style-name="T2">Energy.</text:span></text:p>
        </text:list-item>
      </text:list>
      <text:p text:style-name="P7">Adding the Condenser to Core.py</text:p>
      <text:p text:style-name="P2">Add this method to your HeptagonalProjection class in Core.py. This method acts as the "tap" that draws energy from the projection.</text:p>
      <text:p text:style-name="P1"><text:span text:style-name="T3"><text:s text:c="4"/>def apply_condensation_collapse(self, input_signal_hz):<text:line-break/> <text:s text:c="7"/>"""<text:line-break/> <text:s text:c="7"/>Condenses the 7D phase potential into a 4D usable energy output.<text:line-break/> <text:s text:c="7"/>The conversion efficiency is gated by the attunement to 428.5 Hz.<text:line-break/> <text:s text:c="7"/>"""<text:line-break/> <text:s text:c="7"/># 1. First, gate the simulation by the resonance frequency<text:line-break/> <text:s text:c="7"/># This simulates the 'tuning fork' effect of the condenser<text:line-break/> <text:s text:c="7"/>coherence = self.apply_attunement_filter(input_signal_hz)<text:line-break/> <text:s text:c="7"/><text:line-break/> <text:s text:c="7"/># 2. Extract the magnitude from the 4D spacetime dimensions (3, 4, 5, 6)<text:line-break/> <text:s text:c="7"/># We ignore 0, 1, 2 (the SU(3) color/internal dimensions) as they don't 'collapse' to M4<text:line-break/> <text:s text:c="7"/>m4_potential = np.sum(np.abs(self.phase_space[:, 3:7])**2)<text:line-break/> <text:s text:c="7"/><text:line-break/> <text:s text:c="7"/># 3. Collapse the potential into usable energy density<text:line-break/> <text:s text:c="7"/>usable_energy = m4_potential * coherence<text:line-break/> <text:s text:c="7"/><text:line-break/> <text:s text:c="7"/>return usable_energy<text:line-break/></text:span></text:p>
      <text:p text:style-name="P6">Why this creates the foundation for Abundance</text:p>
      <text:p text:style-name="P2">This code is the "missing link" for the prototype:</text:p>
      <text:list xml:id="list3675184147" text:style-name="WWNum2">
        <text:list-item>
          <text:p text:style-name="P5"><text:span text:style-name="T2">Gated Potential:</text:span> Because the usable_energy is multiplied by coherence, the device will effectively output <text:span text:style-name="T2">zero energy</text:span> if it is not tuned to 428.5 \text{ Hz}. This provides a natural, physics-based safety mechanism.</text:p>
        </text:list-item>
        <text:list-item>
          <text:p text:style-name="P5"><text:span text:style-name="T2">Decoupling from Scarcity:</text:span> In a typical power plant, you pay for the input (coal, gas, uranium). In this model, the "fuel" is the vacuum potential of the 7D bulk. The cost of operation is simply the energy required to maintain the 428.5 \text{ Hz} resonance.</text:p>
        </text:list-item>
        <text:list-item>
          <text:p text:style-name="P5"><text:span text:style-name="T2">The Constitution's Role:</text:span> Since the energy output is derived from a local "tuning" device rather than a centralized grid, it supports the vision of a <text:span text:style-name="T2">distributed, autonomous humanity</text:span>. </text:p>
        </text:list-item>
        <text:list-item>
          <text:p text:style-name="P5">The Universal Constitution can govern how people use this abundance, ensuring it is applied to basic needs (water, health, habitat) rather than exploitation.</text:p>
        </text:list-item>
      </text:list>
      <text:p text:style-name="P7">Testing the Collapse</text:p>
      <text:p text:style-name="P2">To verify the test suite:</text:p>
      <text:p text:style-name="P2"><text:span text:style-name="T3">def test_condensation():<text:line-break/> <text:s text:c="3"/>sim = HeptagonalProjection(total_states=1)<text:line-break/> <text:s text:c="3"/># Simulate a signal at exact resonance<text:line-break/> <text:s text:c="3"/>energy = sim.apply_condensation_collapse(428.5)<text:line-break/> <text:s text:c="3"/>print(f"Condensation successful. Energy output: {energy}")<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1" svg:font-family="Courier"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2" meta:word-count="433" meta:character-count="3037" meta:non-whitespace-character-count="2479"/>
    <meta:generator>LibreOfficeDev/6.0.5.2$Linux_X86_64 LibreOffice_project/</meta:generator>
  </office:meta>
</office:document-meta>
</file>