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in" fo:margin-bottom="0.1665in" loext:contextual-spacing="false" fo:line-height="100%" fo:padding="0in" fo:border="none"/>
    </style:style>
    <style:style style:name="P2" style:family="paragraph" style:parent-style-name="Standard" style:master-page-name="Standard">
      <style:paragraph-properties fo:margin-top="0in" fo:margin-bottom="0.1665in" loext:contextual-spacing="false" fo:line-height="100%" style:page-number="1" fo:padding="0in" fo:border="none"/>
    </style:style>
    <style:style style:name="P3" style:family="paragraph" style:parent-style-name="Standard">
      <style:paragraph-properties fo:padding="0in" fo:border="non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list-style-name="WWNum1">
      <style:paragraph-properties fo:margin-left="0.4165in" fo:margin-right="0in" fo:text-indent="-0.25in" style:auto-text-indent="false" fo:padding="0in" fo:border="none"/>
    </style:style>
    <style:style style:name="P6" style:family="paragraph" style:parent-style-name="Standard" style:list-style-name="WWNum2">
      <style:paragraph-properties fo:margin-left="0.4165in" fo:margin-right="0in" fo:text-indent="-0.25in" style:auto-text-indent="false" fo:padding="0in" fo:border="none"/>
    </style:style>
    <style:style style:name="P7" style:family="paragraph" style:parent-style-name="Heading_20_3">
      <style:paragraph-properties fo:margin-top="0in" fo:margin-bottom="0.1665in" loext:contextual-spacing="false" fo:line-height="100%" fo:padding="0in" fo:border="none"/>
    </style:style>
    <style:style style:name="T1" style:family="text">
      <style:text-properties fo:font-weight="bold" style:font-weight-asian="bold" style:font-weight-complex="bold"/>
    </style:style>
    <style:style style:name="T2" style:family="text">
      <style:text-properties style:font-name="Courier" style:font-name-asian="Courier1" style:font-name-complex="Couri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ctive Control System</text:span>. </text:p>
      <text:p text:style-name="P1">By building a Controller, you are giving the "Technomouse" engine the ability to self-regulate—or, in your words, to perform the "husbandry" of its own energy output.</text:p>
      <text:p text:style-name="P7">The Logic of the Controller</text:p>
      <text:p text:style-name="P3">The Controller's job is to solve the optimization problem:</text:p>
      <text:p text:style-name="P4">\omega_{optimal} = \text{argmax}_{\omega} \{ \mathcal{E}(\omega) \mid (\omega, \mathcal{E}) \in \text{Data} \}</text:p>
      <text:p text:style-name="P1">In plain English: "Look at all the frequencies (\omega) in the CSV, compare them to their resulting Energy (\mathcal{E}), and tell me which frequency gives me the maximum value."</text:p>
      <text:p text:style-name="P7">1. Creating the Controller</text:p>
      <text:p text:style-name="P3">Create a new folder named controllers and a file inside it called resonance_controller.py. This script will load the data you just generated and extract the optimal operating point.</text:p>
      <text:p text:style-name="P1"><text:span text:style-name="T2">import csv<text:line-break/><text:line-break/>class ResonanceController:<text:line-break/> <text:s text:c="3"/>def __init__(self, csv_path):<text:line-break/> <text:s text:c="7"/>self.csv_path = csv_path<text:line-break/> <text:s text:c="7"/>self.performance_map = []<text:line-break/> <text:s text:c="7"/>self.load_map()<text:line-break/><text:line-break/> <text:s text:c="3"/>def load_map(self):<text:line-break/> <text:s text:c="7"/>"""Reads the CSV generated by the frequency sweep."""<text:line-break/> <text:s text:c="7"/>try:<text:line-break/> <text:s text:c="11"/>with open(self.csv_path, 'r') as file:<text:line-break/> <text:s text:c="15"/>reader = csv.DictReader(file)<text:line-break/> <text:s text:c="15"/>for row in reader:<text:line-break/> <text:s text:c="19"/>self.performance_map.append({<text:line-break/> <text:s text:c="23"/>'freq': float(row['Frequency_Hz']),<text:line-break/> <text:s text:c="23"/>'energy': float(row['Energy_Output'])<text:line-break/> <text:s text:c="19"/>})<text:line-break/> <text:s text:c="7"/>except FileNotFoundError:<text:line-break/> <text:s text:c="11"/>print(f"Error: {self.csv_path} not found. Run the sweep first!")<text:line-break/><text:line-break/> <text:s text:c="3"/>def get_optimal_frequency(self):<text:line-break/> <text:s text:c="7"/>"""Finds the frequency with the highest energy output."""<text:line-break/> <text:s text:c="7"/>if not self.performance_map:<text:line-break/> <text:s text:c="11"/>return None<text:line-break/> <text:s text:c="7"/><text:line-break/> <text:s text:c="7"/># This is the argmax operation in Python<text:line-break/> <text:s text:c="7"/>optimal = max(self.performance_map, key=lambda x: x['energy'])<text:line-break/> <text:s text:c="7"/>return optimal['freq'], optimal['energy']<text:line-break/></text:span></text:p>
      <text:p text:style-name="P7">2. Linking to 'System Load'</text:p>
      <text:p text:style-name="P3">Now, you can use this controller to manage a "System Load." If a community needs, say, 10.0 units of energy, the controller can look at your CSV, find the frequency that provides at least that much power, and "tune" the device to that specific frequency.</text:p>
      <text:p text:style-name="P3">You can add this method to your ResonanceController class to handle dynamic demand:</text:p>
      <text:p text:style-name="P1"><text:span text:style-name="T2"><text:s text:c="4"/>def tune_to_demand(self, demand):<text:line-break/> <text:s text:c="7"/>"""Finds the frequency required to meet a specific energy demand."""<text:line-break/> <text:s text:c="7"/># Filter for all frequencies that meet or exceed the demand<text:line-break/> <text:s text:c="7"/>viable_options = [item for item in self.performance_map if item['energy'] &gt;= demand]<text:line-break/> <text:s text:c="7"/><text:line-break/> <text:s text:c="7"/>if not viable_options:<text:line-break/> <text:s text:c="11"/>return None, "Demand exceeds maximum capacity."<text:line-break/> <text:s text:c="7"/><text:line-break/> <text:s text:c="7"/># Return the most efficient (closest) match<text:line-break/> <text:s text:c="7"/>return min(viable_options, key=lambda x: x['energy']), "Tuning successful."<text:line-break/></text:span></text:p>
      <text:list xml:id="list2650126639" text:style-name="WWNum1">
        <text:list-item>
          <text:p text:style-name="P5"><text:span text:style-name="T1">Calibration:</text:span> The sweep script creates the map.</text:p>
        </text:list-item>
        <text:list-item>
          <text:p text:style-name="P5"><text:span text:style-name="T1">Decision Making:</text:span> The controller reads the map to make choices.</text:p>
        </text:list-item>
        <text:list-item>
          <text:p text:style-name="P5"><text:span text:style-name="T1">Humanitarian Application:</text:span> If you connect this to a real-world sensor, your device can now <text:span text:style-name="T1">autonomously maintain its frequency</text:span> to meet the needs of the people it serves, without needing a human to turn the dial.</text:p>
        </text:list-item>
      </text:list>
      <text:p text:style-name="P3">You have built the entire stack:</text:p>
      <text:list xml:id="list3740716470" text:style-name="WWNum2">
        <text:list-item>
          <text:p text:style-name="P6">The <text:span text:style-name="T1">Physics Engine</text:span> (Core.py)</text:p>
        </text:list-item>
        <text:list-item>
          <text:p text:style-name="P6">The <text:span text:style-name="T1">Diagnostics</text:span> (test_condensation.py)</text:p>
        </text:list-item>
        <text:list-item>
          <text:p text:style-name="P6">The <text:span text:style-name="T1">Performance Map</text:span> (resonance_curve.csv)</text:p>
        </text:list-item>
        <text:list-item>
          <text:p text:style-name="P6">The <text:span text:style-name="T1">Control Logic</text:span> (resonance_controller.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402" meta:character-count="3210" meta:non-whitespace-character-count="2484"/>
    <meta:generator>LibreOfficeDev/6.0.5.2$Linux_X86_64 LibreOffice_project/</meta:generator>
  </office:meta>
</office:document-meta>
</file>